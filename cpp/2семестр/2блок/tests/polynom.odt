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7.856cm" table:align="left"/>
    </style:style>
    <style:style style:name="Таблица1.A" style:family="table-column">
      <style:table-column-properties style:column-width="2.473cm"/>
    </style:style>
    <style:style style:name="Таблица1.B" style:family="table-column">
      <style:table-column-properties style:column-width="5.383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fo:letter-spacing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8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9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style:font-name="quote-cjk-patch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Примеры операций с многочленами</text:span></text:span></text:p>
      <text:p text:style-name="P2">Даны многочлены:</text:p>
      <text:p text:style-name="P2">P(x) = 2x² + 3x – 5</text:p>
      <text:p text:style-name="P2">Q(x) = x² – 4x + 1</text:p>
      <text:p text:style-name="Horizontal_20_Line"/>
      <text:p text:style-name="P1"><text:span text:style-name="Strong_20_Emphasis"><text:span text:style-name="T1">1. Вычисление значения многочлена</text:span></text:span></text:p>
      <text:p text:style-name="P2">Найдём P(2):</text:p>
      <text:p text:style-name="P2">P(2) = 2 · 2² + 3 · 2 – 5 = 2 · 4 + 6 – 5 = 8 + 6 – 5 = 9</text:p>
      <text:p text:style-name="P1"><text:span text:style-name="Strong_20_Emphasis"><text:span text:style-name="T1">P(2) = 9</text:span></text:span></text:p>
      <text:p text:style-name="Horizontal_20_Line"/>
      <text:p text:style-name="P1"><text:span text:style-name="Strong_20_Emphasis"><text:span text:style-name="T1">2. Сумма многочленов</text:span></text:span></text:p>
      <text:p text:style-name="P2">P(x) + Q(x) = (2x² + 3x – 5) + (x² – 4x + 1) =</text:p>
      <text:p text:style-name="P2">= 2x² + x² + 3x – 4x – 5 + 1 =</text:p>
      <text:p text:style-name="P2">= 3x² – x – 4</text:p>
      <text:p text:style-name="P1"><text:span text:style-name="Strong_20_Emphasis"><text:span text:style-name="T1">P(x) + Q(x) = 3x² – x – 4</text:span></text:span></text:p>
      <text:p text:style-name="Horizontal_20_Line"/>
      <text:p text:style-name="P1"><text:span text:style-name="Strong_20_Emphasis"><text:span text:style-name="T1">3. Разность многочленов</text:span></text:span></text:p>
      <text:p text:style-name="P2">P(x) – Q(x) = (2x² + 3x – 5) – (x² – 4x + 1) =</text:p>
      <text:p text:style-name="P2">= 2x² + 3x – 5 – x² + 4x – 1 =</text:p>
      <text:p text:style-name="P2"><text:soft-page-break/>= (2x² – x²) + (3x + 4x) + (–5 – 1) =</text:p>
      <text:p text:style-name="P2">= x² + 7x – 6</text:p>
      <text:p text:style-name="P1"><text:span text:style-name="Strong_20_Emphasis"><text:span text:style-name="T1">P(x) – Q(x) = x² + 7x – 6</text:span></text:span></text:p>
      <text:p text:style-name="Horizontal_20_Line"/>
      <text:p text:style-name="P1"><text:span text:style-name="Strong_20_Emphasis"><text:span text:style-name="T1">4. Произведение многочленов</text:span></text:span></text:p>
      <text:p text:style-name="P2">P(x) · Q(x) = (2x² + 3x – 5)(x² – 4x + 1)</text:p>
      <text:p text:style-name="P2">Раскрываем скобки:</text:p>
      <text:p text:style-name="P2">P(x) · Q(x) =</text:p>
      <text:p text:style-name="P2">= 2x² · x² + 2x² · (–4x) + 2x² · 1 +</text:p>
      <text:list text:style-name="L1">
        <text:list-item>
          <text:p text:style-name="P3">3x · x² + 3x · (–4x) + 3x · 1 +</text:p>
        </text:list-item>
        <text:list-item>
          <text:p text:style-name="P3">(–5) · x² + (–5) · (–4x) + (–5) · 1 =</text:p>
        </text:list-item>
      </text:list>
      <text:p text:style-name="P2">= 2x⁴ – 8x³ + 2x² +</text:p>
      <text:list text:style-name="L2">
        <text:list-item>
          <text:p text:style-name="P4">3x³ – 12x² + 3x +</text:p>
        </text:list-item>
      </text:list>
      <text:p text:style-name="P5">– <text:span text:style-name="T2">5x² + 20x – 5</text:span></text:p>
      <text:p text:style-name="P2">Приводим подобные члены:</text:p>
      <text:p text:style-name="P2">= 2x⁴ +</text:p>
      <text:list text:style-name="L3">
        <text:list-item>
          <text:p text:style-name="P6">(–8x³ + 3x³) = –5x³ +</text:p>
        </text:list-item>
        <text:list-item>
          <text:p text:style-name="P6">(2x² – 12x² – 5x²) = –15x² +</text:p>
        </text:list-item>
        <text:list-item>
          <text:p text:style-name="P6">(3x + 20x) = 23x +</text:p>
        </text:list-item>
      </text:list>
      <text:p text:style-name="P5">– <text:span text:style-name="T2">5</text:span></text:p>
      <text:p text:style-name="P1"><text:span text:style-name="Strong_20_Emphasis"><text:span text:style-name="T1">P(x) · Q(x) = 2x⁴ – 5x³ – 15x² + 23x – 5</text:span></text:span></text:p>
      <text:p text:style-name="Horizontal_20_Line"/>
      <text:p text:style-name="P1"><text:span text:style-name="Strong_20_Emphasis"><text:span text:style-name="T1">Сводная таблица</text:span>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ext:soft-page-break/>
          <table:table-row>
            <table:table-cell table:style-name="Таблица1.A1" office:value-type="string">
              <text:p text:style-name="P7">Операция</text:p>
            </table:table-cell>
            <table:table-cell table:style-name="Таблица1.A1" office:value-type="string">
              <text:p text:style-name="P7">Результат</text:p>
            </table:table-cell>
          </table:table-row>
        </table:table-header-rows>
        <table:table-row>
          <table:table-cell table:style-name="Таблица1.A2" office:value-type="string">
            <text:p text:style-name="P8">P(2)</text:p>
          </table:table-cell>
          <table:table-cell table:style-name="Таблица1.A2" office:value-type="string">
            <text:p text:style-name="P8">9</text:p>
          </table:table-cell>
        </table:table-row>
        <table:table-row>
          <table:table-cell table:style-name="Таблица1.A2" office:value-type="string">
            <text:p text:style-name="P8">P(x) + Q(x)</text:p>
          </table:table-cell>
          <table:table-cell table:style-name="Таблица1.A2" office:value-type="string">
            <text:p text:style-name="P8">3x² – x – 4</text:p>
          </table:table-cell>
        </table:table-row>
        <table:table-row>
          <table:table-cell table:style-name="Таблица1.A2" office:value-type="string">
            <text:p text:style-name="P8">P(x) – Q(x)</text:p>
          </table:table-cell>
          <table:table-cell table:style-name="Таблица1.A2" office:value-type="string">
            <text:p text:style-name="P8">x² + 7x – 6</text:p>
          </table:table-cell>
        </table:table-row>
        <table:table-row>
          <table:table-cell table:style-name="Таблица1.A2" office:value-type="string">
            <text:p text:style-name="P8">P(x) · Q(x)</text:p>
          </table:table-cell>
          <table:table-cell table:style-name="Таблица1.A2" office:value-type="string">
            <text:p text:style-name="P9">2x⁴ – 5x³ – 15x² + 23x – 5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23:17:07.124044636</meta:creation-date>
    <dc:date>2026-05-05T23:17:52.167417396</dc:date>
    <meta:editing-duration>PT46S</meta:editing-duration>
    <meta:editing-cycles>1</meta:editing-cycles>
    <meta:document-statistic meta:table-count="1" meta:image-count="0" meta:object-count="0" meta:page-count="3" meta:paragraph-count="48" meta:word-count="336" meta:character-count="1022" meta:non-whitespace-character-count="752"/>
    <meta:generator>LibreOffice/25.2.3.2$Linux_X86_64 LibreOffice_project/520$Build-2</meta:generator>
  </office:meta>
</office:document-meta>
</file>